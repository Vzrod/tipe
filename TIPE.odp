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F0000011752C17D80.png" manifest:media-type="image/png"/>
  <manifest:file-entry manifest:full-path="Pictures/100000010000009E0000001DEE62718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Text_20_A0">
      <style:graphic-properties draw:stroke="none" draw:fill="none" fo:min-height="0.481cm" loext:decorative="false"/>
      <style:paragraph-properties style:writing-mode="lr-tb"/>
    </style:style>
    <style:style style:name="pr1" style:family="presentation" style:parent-style-name="Standard-title">
      <style:graphic-properties fo:min-height="3.505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2.17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title">
      <style:graphic-properties fo:min-height="3.50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4.633cm" loext:decorative="false"/>
      <style:paragraph-properties style:writing-mode="lr-tb"/>
    </style:style>
    <style:style style:name="pr7" style:family="presentation" style:parent-style-name="Standard-outline1">
      <style:graphic-properties fo:min-height="8.88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9" style:family="presentation" style:parent-style-name="Standard-outline1">
      <style:graphic-properties draw:auto-grow-height="true" draw:fit-to-size="false" style:shrink-to-fit="false" fo:min-height="12.041cm" loext:decorative="false"/>
      <style:paragraph-properties style:writing-mode="lr-tb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8" style:family="paragraph">
      <style:paragraph-properties fo:margin-top="0.42cm" fo:margin-bottom="0.35cm"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22pt" style:letter-kerning="true" style:font-name-asian="Noto Sans SC" style:font-size-asian="22pt" style:font-name-complex="Arial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TIPE</text:p>
          </draw:text-box>
        </draw:frame>
        <draw:frame presentation:style-name="pr2" draw:text-style-name="P1" draw:layer="layout" svg:width="25.199cm" svg:height="12.179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4.633cm" svg:x="1.4cm" svg:y="0.274cm" presentation:class="title">
          <draw:text-box>
            <text:p>I) Modélisation des interférence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 : trouver une modélisation du bruit</text:p>
              </text:list-item>
              <text:list-item>
                <text:p>Sources + modèle + quantification (impact de chaque sc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ruit thermiqu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Du à l’agitation thermique des porteurs de charges</text:p>
              </text:list-item>
              <text:list-item>
                <text:p>Relation de Nyquist : </text:p>
              </text:list-item>
            </text:list>
            <text:p/>
            <text:p>AN : </text:p>
            <text:p>Delta_f : bande passante , vb² = variance de la tension au borne de la res</text:p>
            <text:p>=&gt; densité spectrale constante : bruit AWGN</text:p>
          </draw:text-box>
        </draw:frame>
        <draw:frame draw:style-name="gr2" draw:text-style-name="P3" draw:layer="layout" svg:width="6.907cm" svg:height="1.266cm" svg:x="11.5cm" svg:y="6.234cm">
          <draw:image xlink:href="Pictures/100000010000009E0000001DEE6271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a propagation multi-trajet (fading)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Modélisation</text:p>
              </text:list-item>
              <text:list-item>
                <text:p>Négligeabilité (dernière partie pour tunnel) ?</text:p>
              </text:list-item>
              <text:list-item>
                <text:p>Principe → Distribution Rician dans le cas ou il y a un chemin direct sans obstac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urst erro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nterleav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4.633cm" svg:x="1.4cm" svg:y="0.274cm" presentation:class="title">
          <draw:text-box>
            <text:p>II)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A) Principe</text:p>
              </text:list-item>
              <text:list-item>
                <text:p>B) Métriques</text:p>
              </text:list-item>
              <text:list-item>
                <text:p>C) Simulations et comparais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Principe de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ectif : transmettre des informations aux travers d’un canal contraignant (bruit, pk pas en bande de base ?...)</text:p>
              </text:list-item>
              <text:list-item>
                <text:p>Moduler les données avec une porteuse transportant l’information</text:p>
              </text:list-item>
              <text:list-item>
                <text:p>ASK/FSK/PSK/QAM</text:p>
              </text:list-item>
              <text:list-item>
                <text:p>3 paramètres sur lesquelles jouer pour la modulation : amplitude, fréquence et phase</text:p>
              </text:list-item>
              <text:list-item>
                <text:p>Démodulation : norme eucl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draw:frame draw:style-name="gr3" draw:text-style-name="P5" draw:layer="layout" svg:width="0.093cm" svg:height="0.481cm" svg:x="14.285cm" svg:y="10.233cm">
          <draw:text-box>
            <text:p text:style-name="P4"><text:span text:style-name="T1"><text:a xlink:href="https://gctjaipur.wordpress.com/wp-content/uploads/2015/08/digital-communication-over-fading-channels.pdf" xlink:type="simple"/></text:span><text:span text:style-name="T1"><text:s/></text:span></text:p>
          </draw:text-box>
        </draw:frame>
        <draw:frame draw:style-name="gr2" draw:text-style-name="P3" draw:layer="layout" svg:width="20.589cm" svg:height="9.718cm" svg:x="4cm" svg:y="6.282cm">
          <draw:image xlink:href="Pictures/100000010000024F0000011752C17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tion de canal / débit / bande passante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élisation d’un signal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requence f</text:p>
              </text:list-item>
              <text:list-item>
                <text:p>L oversampling factor / fs = f*L</text:p>
              </text:list-item>
              <text:list-item>
                <text:p>Alors le pas temporel est def tq dt = 1/fs</text:p>
                <text:p>→ t = np.arange(0,nb,1/fs)</text:p>
              </text:list-item>
              <text:list-item>
                <text:p>Un bit dure 1 unité de temps, → on l’étale à L</text:p>
                <text:p>C4EST KE TRUC IMPOOIRTANT A DEF POIUR LA SU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B) Métriques</text:p>
          </draw:text-box>
        </draw:frame>
        <draw:frame presentation:style-name="pr7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ie et puissance d’un signal/d’un symbole</text:p>
          </draw:text-box>
        </draw:frame>
        <draw:frame presentation:style-name="pr9" draw:text-style-name="P7" draw:layer="layout" svg:width="25.199cm" svg:height="12.041cm" svg:x="1.4cm" svg:y="4.913cm" presentation:class="outline" presentation:user-transformed="true">
          <draw:text-box>
            <text:list text:style-name="L2">
              <text:list-item>
                <text:p text:style-name="P6"><text:span text:style-name="T2">Intégrale de -inf à +inf de |x(t)|²dt (signal elec -&gt; energie en J dissipé par res de 1ohm), energie réelle dmd de scaler par l’impédance</text:span></text:p>
              </text:list-item>
              <text:list-item>
                <text:p text:style-name="P6"><text:span text:style-name="T2">Discret : Ex = ||x||² = somme des |x[n]|²</text:span></text:p>
                <text:p text:style-name="P6"><text:span text:style-name="T2"/></text:p>
              </text:list-item>
              <text:list-item>
                <text:p text:style-name="P6"><text:span text:style-name="T2">Px = lim 1/(2N+1) somme de -N à N de |x[k]|² (energie sur temps)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N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 text:style-name="P8"><text:span text:style-name="T3">Canal de largeur de bande B, on note Pr la puissance du signal recu et N0 la densité spectral du bruit, alors</text:span></text:p>
              </text:list-item>
              <text:list-item>
                <text:p text:style-name="P8"><text:span text:style-name="T3">(SNR) = Psignal/Pbruit = Pr/(N0.B)</text:span></text:p>
                <text:p text:style-name="P8"><text:span text:style-name="T3">SNR dépend de la largeur de bande → Objectif la réduire ?</text:span></text:p>
                <text:p text:style-name="P8"><text:span text:style-name="T3"/></text:p>
              </text:list-item>
              <text:list-item>
                <text:p text:style-name="P8"><text:span text:style-name="T3">Lier Psignal recu et Eb/Es : Eb = Psignal / bit rate </text:span></text:p>
              </text:list-item>
              <text:list-item>
                <text:p text:style-name="P8"><text:span text:style-name="T3">(SNRb) = Eb/N0 → sans dim</text:span></text:p>
              </text:list-item>
              <text:list-item>
                <text:p text:style-name="P8"><text:span text:style-name="T3">(SNRs) = Es/N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GW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Objectif : ajout linéaire de bruit correspondant au SNR désiré</text:p>
              </text:list-item>
              <text:list-item>
                <text:p>Signal s, Ps = L*1/N somme(N,|s[k]|²) (*oversampling factor)</text:p>
              </text:list-item>
              <text:list-item>
                <text:p>Alors N0 = Ps/SNR</text:p>
              </text:list-item>
              <text:list-item>
                <text:p>La variance de la loi gaussienne correspondant à une densité de bruit N0 est sigma²=N0/2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nsité spectrale de puissanc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épartition fréquentielle de la puissan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R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ulations : courbes + comp théorie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araison diff modulatio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BER/Etalement spectral/Débit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’autres paramètres sur lesquelles jouer 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Nc → étalement spectral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leaving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des correcteurs d’erreurs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EM Dans un tunne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ebonds négligeables 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3T19:34:22.836271600</meta:creation-date>
    <dc:date>2026-03-16T13:54:55.206388700</dc:date>
    <meta:editing-duration>PT1H16M45S</meta:editing-duration>
    <meta:editing-cycles>11</meta:editing-cycles>
    <meta:generator>LibreOffice/25.8.4.2$Windows_X86_64 LibreOffice_project/290daaa01b999472f0c7a3890eb6a550fd74c6df</meta:generator>
    <meta:print-date>2026-03-02T18:55:10.958623600</meta:print-date>
    <meta:printed-by>Fichiers PDF</meta:printed-by>
    <meta:document-statistic meta:object-count="120"/>
  </office:meta>
</office:document-meta>
</file>